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3900000384DE0BDE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c9e5"/>
    </style:style>
    <style:style style:name="P2" style:family="paragraph" style:parent-style-name="Standard">
      <style:text-properties officeooo:paragraph-rsid="001aea6e"/>
    </style:style>
    <style:style style:name="P3" style:family="paragraph" style:parent-style-name="Standard">
      <style:text-properties officeooo:paragraph-rsid="0021867c"/>
    </style:style>
    <style:style style:name="P4" style:family="paragraph" style:parent-style-name="Standard">
      <style:text-properties officeooo:rsid="0021867c" officeooo:paragraph-rsid="0021867c"/>
    </style:style>
    <style:style style:name="P5" style:family="paragraph" style:parent-style-name="Standard">
      <style:text-properties officeooo:rsid="0021867c" officeooo:paragraph-rsid="003f9449"/>
    </style:style>
    <style:style style:name="P6" style:family="paragraph" style:parent-style-name="Standard">
      <style:text-properties officeooo:paragraph-rsid="00275b2f"/>
    </style:style>
    <style:style style:name="P7" style:family="paragraph" style:parent-style-name="Standard">
      <style:text-properties officeooo:rsid="002abb57" officeooo:paragraph-rsid="003f9449"/>
    </style:style>
    <style:style style:name="P8" style:family="paragraph" style:parent-style-name="Standard">
      <style:text-properties fo:color="#00a933" loext:opacity="100%" fo:font-style="italic" officeooo:paragraph-rsid="00327909" style:font-style-asian="italic" style:font-style-complex="italic"/>
    </style:style>
    <style:style style:name="P9" style:family="paragraph" style:parent-style-name="Standard">
      <style:text-properties officeooo:paragraph-rsid="00381f07"/>
    </style:style>
    <style:style style:name="P10" style:family="paragraph" style:parent-style-name="Standard">
      <style:text-properties officeooo:rsid="003b4297" officeooo:paragraph-rsid="003ce766"/>
    </style:style>
    <style:style style:name="P11" style:family="paragraph" style:parent-style-name="Standard">
      <style:text-properties officeooo:paragraph-rsid="003b4297"/>
    </style:style>
    <style:style style:name="P12" style:family="paragraph" style:parent-style-name="Standard">
      <style:text-properties officeooo:rsid="0045ef5f" officeooo:paragraph-rsid="0045ef5f"/>
    </style:style>
    <style:style style:name="P13" style:family="paragraph" style:parent-style-name="Standard">
      <style:text-properties officeooo:rsid="0039dd88" officeooo:paragraph-rsid="0039dd88"/>
    </style:style>
    <style:style style:name="P14" style:family="paragraph" style:parent-style-name="Standard">
      <style:text-properties officeooo:rsid="00553800" officeooo:paragraph-rsid="00553800"/>
    </style:style>
    <style:style style:name="P15" style:family="paragraph" style:parent-style-name="Standard">
      <style:text-properties officeooo:rsid="00553800" officeooo:paragraph-rsid="005ad075"/>
    </style:style>
    <style:style style:name="P16" style:family="paragraph" style:parent-style-name="Standard">
      <style:text-properties officeooo:paragraph-rsid="00553800"/>
    </style:style>
    <style:style style:name="P17" style:family="paragraph" style:parent-style-name="Standard">
      <style:text-properties officeooo:paragraph-rsid="004b842d"/>
    </style:style>
    <style:style style:name="P18" style:family="paragraph" style:parent-style-name="Standard">
      <style:text-properties officeooo:rsid="0056275e" officeooo:paragraph-rsid="0056275e"/>
    </style:style>
    <style:style style:name="P19" style:family="paragraph" style:parent-style-name="Standard">
      <style:text-properties officeooo:rsid="0057bb7f" officeooo:paragraph-rsid="005ad075"/>
    </style:style>
    <style:style style:name="P20" style:family="paragraph" style:parent-style-name="Standard">
      <style:text-properties officeooo:rsid="005ad075" officeooo:paragraph-rsid="005ad075"/>
    </style:style>
    <style:style style:name="P21" style:family="paragraph" style:parent-style-name="Standard">
      <style:text-properties officeooo:paragraph-rsid="00646713"/>
    </style:style>
    <style:style style:name="P22" style:family="paragraph" style:parent-style-name="Standard">
      <style:text-properties officeooo:rsid="00685c85" officeooo:paragraph-rsid="00685c85"/>
    </style:style>
    <style:style style:name="P23" style:family="paragraph" style:parent-style-name="Standard">
      <style:text-properties officeooo:rsid="006d3ce2" officeooo:paragraph-rsid="006d3ce2"/>
    </style:style>
    <style:style style:name="P24" style:family="paragraph" style:parent-style-name="Standard">
      <style:text-properties officeooo:rsid="006d7a60" officeooo:paragraph-rsid="006d7a60"/>
    </style:style>
    <style:style style:name="P25" style:family="paragraph" style:parent-style-name="Standard">
      <style:text-properties officeooo:rsid="00705b78" officeooo:paragraph-rsid="00705b78"/>
    </style:style>
    <style:style style:name="P26" style:family="paragraph" style:parent-style-name="Standard">
      <style:text-properties officeooo:rsid="00721715" officeooo:paragraph-rsid="00721715"/>
    </style:style>
    <style:style style:name="P27" style:family="paragraph" style:parent-style-name="Standard">
      <style:text-properties officeooo:rsid="00750789" officeooo:paragraph-rsid="00750789"/>
    </style:style>
    <style:style style:name="P28" style:family="paragraph" style:parent-style-name="Standard">
      <style:text-properties officeooo:rsid="00765084" officeooo:paragraph-rsid="00765084"/>
    </style:style>
    <style:style style:name="P29" style:family="paragraph" style:parent-style-name="Standard">
      <style:text-properties officeooo:rsid="007b84a5" officeooo:paragraph-rsid="007b84a5"/>
    </style:style>
    <style:style style:name="P30" style:family="paragraph" style:parent-style-name="Standard">
      <style:text-properties officeooo:paragraph-rsid="007d2960"/>
    </style:style>
    <style:style style:name="P31" style:family="paragraph" style:parent-style-name="Standard">
      <style:text-properties officeooo:rsid="007ef972" officeooo:paragraph-rsid="007ef972"/>
    </style:style>
    <style:style style:name="T1" style:family="text">
      <style:text-properties officeooo:rsid="0011ffb3"/>
    </style:style>
    <style:style style:name="T2" style:family="text">
      <style:text-properties officeooo:rsid="0013f327"/>
    </style:style>
    <style:style style:name="T3" style:family="text">
      <style:text-properties officeooo:rsid="0014e051"/>
    </style:style>
    <style:style style:name="T4" style:family="text">
      <style:text-properties officeooo:rsid="00154e2b"/>
    </style:style>
    <style:style style:name="T5" style:family="text">
      <style:text-properties officeooo:rsid="0016c9e5"/>
    </style:style>
    <style:style style:name="T6" style:family="text">
      <style:text-properties officeooo:rsid="001827d6"/>
    </style:style>
    <style:style style:name="T7" style:family="text">
      <style:text-properties officeooo:rsid="00195c60"/>
    </style:style>
    <style:style style:name="T8" style:family="text">
      <style:text-properties officeooo:rsid="001aea6e"/>
    </style:style>
    <style:style style:name="T9" style:family="text">
      <style:text-properties officeooo:rsid="001b8bef"/>
    </style:style>
    <style:style style:name="T10" style:family="text">
      <style:text-properties officeooo:rsid="001d34fc"/>
    </style:style>
    <style:style style:name="T11" style:family="text">
      <style:text-properties style:text-underline-style="solid" style:text-underline-type="double" style:text-underline-width="auto" style:text-underline-color="font-color" officeooo:rsid="001d34fc"/>
    </style:style>
    <style:style style:name="T12" style:family="text">
      <style:text-properties style:text-underline-style="solid" style:text-underline-type="double" style:text-underline-width="auto" style:text-underline-color="font-color" officeooo:rsid="00195c60"/>
    </style:style>
    <style:style style:name="T13" style:family="text">
      <style:text-properties officeooo:rsid="001dfabc"/>
    </style:style>
    <style:style style:name="T14" style:family="text">
      <style:text-properties officeooo:rsid="001f71fd"/>
    </style:style>
    <style:style style:name="T15" style:family="text">
      <style:text-properties officeooo:rsid="0021009e"/>
    </style:style>
    <style:style style:name="T16" style:family="text">
      <style:text-properties officeooo:rsid="0021867c"/>
    </style:style>
    <style:style style:name="T17" style:family="text">
      <style:text-properties officeooo:rsid="00231da2"/>
    </style:style>
    <style:style style:name="T18" style:family="text">
      <style:text-properties officeooo:rsid="00233dea"/>
    </style:style>
    <style:style style:name="T19" style:family="text">
      <style:text-properties officeooo:rsid="00261562"/>
    </style:style>
    <style:style style:name="T20" style:family="text">
      <style:text-properties officeooo:rsid="00275b2f"/>
    </style:style>
    <style:style style:name="T21" style:family="text">
      <style:text-properties officeooo:rsid="002c6f87"/>
    </style:style>
    <style:style style:name="T22" style:family="text">
      <style:text-properties officeooo:rsid="002e3ae3"/>
    </style:style>
    <style:style style:name="T23" style:family="text">
      <style:text-properties officeooo:rsid="002eb490"/>
    </style:style>
    <style:style style:name="T24" style:family="text">
      <style:text-properties officeooo:rsid="00308699"/>
    </style:style>
    <style:style style:name="T25" style:family="text">
      <style:text-properties officeooo:rsid="00327909"/>
    </style:style>
    <style:style style:name="T26" style:family="text">
      <style:text-properties officeooo:rsid="0034df04"/>
    </style:style>
    <style:style style:name="T27" style:family="text">
      <style:text-properties officeooo:rsid="00362dbf"/>
    </style:style>
    <style:style style:name="T28" style:family="text">
      <style:text-properties officeooo:rsid="0036a548"/>
    </style:style>
    <style:style style:name="T29" style:family="text">
      <style:text-properties officeooo:rsid="00381f07"/>
    </style:style>
    <style:style style:name="T30" style:family="text">
      <style:text-properties officeooo:rsid="0039dd88"/>
    </style:style>
    <style:style style:name="T31" style:family="text">
      <style:text-properties officeooo:rsid="003b4297"/>
    </style:style>
    <style:style style:name="T32" style:family="text">
      <style:text-properties officeooo:rsid="003ce766"/>
    </style:style>
    <style:style style:name="T33" style:family="text">
      <style:text-properties officeooo:rsid="003d95ac"/>
    </style:style>
    <style:style style:name="T34" style:family="text">
      <style:text-properties officeooo:rsid="003f9449"/>
    </style:style>
    <style:style style:name="T35" style:family="text">
      <style:text-properties officeooo:rsid="00404176"/>
    </style:style>
    <style:style style:name="T36" style:family="text">
      <style:text-properties officeooo:rsid="004220b7"/>
    </style:style>
    <style:style style:name="T37" style:family="text">
      <style:text-properties officeooo:rsid="00427004"/>
    </style:style>
    <style:style style:name="T38" style:family="text">
      <style:text-properties officeooo:rsid="00432ba9"/>
    </style:style>
    <style:style style:name="T39" style:family="text">
      <style:text-properties officeooo:rsid="00436fff"/>
    </style:style>
    <style:style style:name="T40" style:family="text">
      <style:text-properties officeooo:rsid="0045ef5f"/>
    </style:style>
    <style:style style:name="T41" style:family="text">
      <style:text-properties officeooo:rsid="0046a476"/>
    </style:style>
    <style:style style:name="T42" style:family="text">
      <style:text-properties officeooo:rsid="0047bc78"/>
    </style:style>
    <style:style style:name="T43" style:family="text">
      <style:text-properties officeooo:rsid="0047f49c"/>
    </style:style>
    <style:style style:name="T44" style:family="text">
      <style:text-properties officeooo:rsid="004b842d"/>
    </style:style>
    <style:style style:name="T45" style:family="text">
      <style:text-properties officeooo:rsid="004d2639"/>
    </style:style>
    <style:style style:name="T46" style:family="text">
      <style:text-properties officeooo:rsid="004d6f3a"/>
    </style:style>
    <style:style style:name="T47" style:family="text">
      <style:text-properties officeooo:rsid="004fee4e"/>
    </style:style>
    <style:style style:name="T48" style:family="text">
      <style:text-properties officeooo:rsid="0051db15"/>
    </style:style>
    <style:style style:name="T49" style:family="text">
      <style:text-properties officeooo:rsid="00528c45"/>
    </style:style>
    <style:style style:name="T50" style:family="text">
      <style:text-properties officeooo:rsid="00553800"/>
    </style:style>
    <style:style style:name="T51" style:family="text">
      <style:text-properties officeooo:rsid="0056275e"/>
    </style:style>
    <style:style style:name="T52" style:family="text">
      <style:text-properties officeooo:rsid="0057bb7f"/>
    </style:style>
    <style:style style:name="T53" style:family="text">
      <style:text-properties officeooo:rsid="005916fa"/>
    </style:style>
    <style:style style:name="T54" style:family="text">
      <style:text-properties officeooo:rsid="0059b34a"/>
    </style:style>
    <style:style style:name="T55" style:family="text">
      <style:text-properties officeooo:rsid="005ad075"/>
    </style:style>
    <style:style style:name="T56" style:family="text">
      <style:text-properties officeooo:rsid="005d5ddc"/>
    </style:style>
    <style:style style:name="T57" style:family="text">
      <style:text-properties officeooo:rsid="0060507c"/>
    </style:style>
    <style:style style:name="T58" style:family="text">
      <style:text-properties officeooo:rsid="00624728"/>
    </style:style>
    <style:style style:name="T59" style:family="text">
      <style:text-properties officeooo:rsid="0062968b"/>
    </style:style>
    <style:style style:name="T60" style:family="text">
      <style:text-properties officeooo:rsid="00646713"/>
    </style:style>
    <style:style style:name="T61" style:family="text">
      <style:text-properties officeooo:rsid="0065f2a8"/>
    </style:style>
    <style:style style:name="T62" style:family="text">
      <style:text-properties officeooo:rsid="0067ca64"/>
    </style:style>
    <style:style style:name="T63" style:family="text">
      <style:text-properties officeooo:rsid="006a2cac"/>
    </style:style>
    <style:style style:name="T64" style:family="text">
      <style:text-properties officeooo:rsid="006bc85e"/>
    </style:style>
    <style:style style:name="T65" style:family="text">
      <style:text-properties officeooo:rsid="006d1d08"/>
    </style:style>
    <style:style style:name="T66" style:family="text">
      <style:text-properties officeooo:rsid="006d9061"/>
    </style:style>
    <style:style style:name="T67" style:family="text">
      <style:text-properties officeooo:rsid="00702496"/>
    </style:style>
    <style:style style:name="T68" style:family="text">
      <style:text-properties officeooo:rsid="00703776"/>
    </style:style>
    <style:style style:name="T69" style:family="text">
      <style:text-properties officeooo:rsid="007075cd"/>
    </style:style>
    <style:style style:name="T70" style:family="text">
      <style:text-properties officeooo:rsid="0071251a"/>
    </style:style>
    <style:style style:name="T71" style:family="text">
      <style:text-properties officeooo:rsid="007215af"/>
    </style:style>
    <style:style style:name="T72" style:family="text">
      <style:text-properties officeooo:rsid="00721715"/>
    </style:style>
    <style:style style:name="T73" style:family="text">
      <style:text-properties officeooo:rsid="00731389"/>
    </style:style>
    <style:style style:name="T74" style:family="text">
      <style:text-properties officeooo:rsid="0076f83e"/>
    </style:style>
    <style:style style:name="T75" style:family="text">
      <style:text-properties officeooo:rsid="0078b282"/>
    </style:style>
    <style:style style:name="T76" style:family="text">
      <style:text-properties officeooo:rsid="007a59d5"/>
    </style:style>
    <style:style style:name="T77" style:family="text">
      <style:text-properties officeooo:rsid="007d2960"/>
    </style:style>
    <style:style style:name="T78" style:family="text">
      <style:text-properties officeooo:rsid="0080271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 are gonna start a new take home assignment full stack project. You are going to act like a senior frontend/senior fullstack engineer. Here are your requirements:</text:p>
      <text:p text:style-name="Standard"/>
      <text:p text:style-name="Standard"/>
      <text:p text:style-name="Standard">Assignment: SyncBoard — Real-Time Collaborative Whiteboard</text:p>
      <text:p text:style-name="Standard"/>
      <text:p text:style-name="Standard">Objective: Build a real-time collaborative whiteboard where multiple users (minimum 2–3) can draw and type simultaneously on the same board.</text:p>
      <text:p text:style-name="Standard"/>
      <text:p text:style-name="Standard"/>
      <text:p text:style-name="Standard">Functional Requirements:</text:p>
      <text:p text:style-name="Standard"/>
      <text:p text:style-name="Standard">1. Real-Time Collaboration</text:p>
      <text:p text:style-name="Standard"/>
      <text:p text:style-name="Standard">* Users should be able to join a shared board using a room ID.</text:p>
      <text:p text:style-name="Standard">* Actions performed by one user must reflect instantly for all connected users.</text:p>
      <text:p text:style-name="Standard">* Display active users in the session.</text:p>
      <text:p text:style-name="Standard">* Handle user disconnects gracefully.</text:p>
      <text:p text:style-name="Standard"/>
      <text:p text:style-name="Standard">2. Drawing Tool</text:p>
      <text:p text:style-name="Standard"/>
      <text:p text:style-name="Standard">* Freehand drawing using mouse.</text:p>
      <text:p text:style-name="Standard">* Support color and stroke thickness selection.</text:p>
      <text:p text:style-name="Standard">* Drawing updates must sync in real time across users.</text:p>
      <text:p text:style-name="Standard"/>
      <text:p text:style-name="Standard">3. Text Tool</text:p>
      <text:p text:style-name="Standard"/>
      <text:p text:style-name="Standard">* Add editable text blocks to the board.</text:p>
      <text:p text:style-name="Standard">* Text blocks should be movable.</text:p>
      <text:p text:style-name="Standard">* Text edits must sync in real time.</text:p>
      <text:p text:style-name="Standard"/>
      <text:p text:style-name="Standard">4. Object Interaction</text:p>
      <text:p text:style-name="Standard"/>
      <text:p text:style-name="Standard">* Drag and move elements.</text:p>
      <text:p text:style-name="Standard">* Delete elements.</text:p>
      <text:p text:style-name="Standard">* Clear board functionality.</text:p>
      <text:p text:style-name="Standard"/>
      <text:p text:style-name="Standard">5. Live Cursor Presence</text:p>
      <text:p text:style-name="Standard"/>
      <text:p text:style-name="Standard">* Show real-time cursor position of other connected users.</text:p>
      <text:p text:style-name="Standard"/>
      <text:p text:style-name="Standard">Technical Expectations for Frontend:</text:p>
      <text:p text:style-name="Standard"/>
      <text:p text:style-name="Standard">* React (preferred)</text:p>
      <text:p text:style-name="Standard">* Use Canvas API. Strictly avoid using whiteboard abstraction libraries.</text:p>
      <text:p text:style-name="Standard">* Clear state modeling and separation of concerns</text:p>
      <text:p text:style-name="Standard"/>
      <text:p text:style-name="Standard">Technical Expectations for Backend:</text:p>
      <text:p text:style-name="Standard"/>
      <text:p text:style-name="Standard"><text:soft-page-break/>* WebSockets</text:p>
      <text:p text:style-name="Standard">* Room-based broadcasting</text:p>
      <text:p text:style-name="Standard">* In-memory state is acceptable</text:p>
      <text:p text:style-name="Standard"/>
      <text:p text:style-name="Standard">Constraints</text:p>
      <text:p text:style-name="Standard"/>
      <text:p text:style-name="Standard">* Do not use third-party real-time whiteboard SDKs.</text:p>
      <text:p text:style-name="Standard">* Avoid relying entirely on Firebase or similar tools to abstract collaboration logic.</text:p>
      <text:p text:style-name="Standard">* Focus on designing your own real-time synchronization approach.</text:p>
      <text:p text:style-name="Standard"/>
      <text:p text:style-name="Standard">Edge Cases to Consider</text:p>
      <text:p text:style-name="Standard"/>
      <text:p text:style-name="Standard">* Multiple users drawing simultaneously</text:p>
      <text:p text:style-name="Standard">* User disconnecting mid-draw</text:p>
      <text:p text:style-name="Standard">* High-frequency cursor movement</text:p>
      <text:p text:style-name="Standard">* Performance with large numbers of elements</text:p>
      <text:p text:style-name="Standard"/>
      <text:p text:style-name="Standard">Deliverables</text:p>
      <text:p text:style-name="Standard"/>
      <text:p text:style-name="Standard">* After analyzing this you need to provide README including:</text:p>
      <text:p text:style-name="Standard"><text:s text:c="2"/>** Architecture overview</text:p>
      <text:p text:style-name="Standard"><text:s text:c="2"/>** State management explanation</text:p>
      <text:p text:style-name="Standard"><text:s text:c="2"/>** Real-time synchronization approach</text:p>
      <text:p text:style-name="Standard"><text:s text:c="2"/>** Performance considerations</text:p>
      <text:p text:style-name="Standard"><text:s text:c="2"/>** Trade-offs and assumptions</text:p>
      <text:p text:style-name="Standard"><text:s text:c="2"/>** System architecture</text:p>
      <text:p text:style-name="Standard"><text:s text:c="2"/>** Key technical decisions</text:p>
      <text:p text:style-name="Standard"><text:s text:c="2"/>** How conflicts and real-time updates are handled</text:p>
      <text:p text:style-name="Standard"/>
      <text:p text:style-name="Standard"/>
      <text:p text:style-name="P16">## <text:span text:style-name="T75">Technical &amp; human level instructions</text:span>:</text:p>
      <text:p text:style-name="P23">* For the backend, we’ll use node.js server with socket.io library. We store a separate Map data structure where we associate a user id as the key and user’s ‘name’ as the value. Whenever we need to send a list of user names to the client, we find the user names by first checking the room’s keys, which are the user ids and loop over them and use the second map to obtain the user names and send that list back to the client.</text:p>
      <text:p text:style-name="P24">* Regarding storing path and text data, we store the shared data for the room in a Map, where, the key would be the object(path or text block’s ID) and the value would be a JSON object of type:<text:line-break/><text:span text:style-name="T66">```</text:span><text:line-break/>{ isDrawing: boolean, isLock: boolean, type: ‘path’ | ‘text’, &lt;...rest of the properties of this JSON needed for both the path shadow array and the text block so that they can be used by the frontend/client to draw them onto the canvas&gt; }<text:line-break/><text:span text:style-name="T66">```</text:span></text:p>
      <text:p text:style-name="P26">* Have all the backend code in one single index.ts file.</text:p>
      <text:p text:style-name="P24">* <text:span text:style-name="T67">M</text:span>ake sure webscoket connection between frontend &amp; server app works even if they're running on different ports - i.e. <text:span text:style-name="T68">manage or fix </text:span>cors <text:span text:style-name="T68">properly</text:span>.</text:p>
      <text:p text:style-name="P25">* Use no or minimal amount of libraries. For frontend, the project should be in react <text:span text:style-name="T72">with typescript </text:span>and stick to tailwind classes for styling and toast notifications and use pure JS rather than any libraries <text:soft-page-break/>or frameworks <text:span text:style-name="T69">and use socket.io frontend library for communication with the socket.io </text:span><text:span text:style-name="T70">node </text:span><text:span text:style-name="T69">server</text:span>. <text:span text:style-name="T74">Use vite as the bundler for frontend repo.</text:span></text:p>
      <text:p text:style-name="P31">* Use design system and color scheme from the home page mock image attached below in rendering both ‘Home’ and ‘Canvas’ page.</text:p>
      <text:p text:style-name="P26">* Use prettier, eslint with industry standard defaults for both frontend and backend <text:span text:style-name="T73">repositories</text:span>.</text:p>
      <text:p text:style-name="P27">* Have all the source code for both frontend &amp; backend repo in a src/ directory.</text:p>
      <text:p text:style-name="P27">* Break up frontend code into meaningful components with proper state management using react context for global state management and have the ‘socket’ object in the client as a global state value so that it’s accessible in any component.</text:p>
      <text:p text:style-name="P28">* Common utils and styles should be in a single utils.ts and main.css file respectively. Component related utils and css files should live along with the component.ts in their own folder inside src/components directory.</text:p>
      <text:p text:style-name="P28"/>
      <text:p text:style-name="P28"/>
      <text:p text:style-name="P17">* Firstly, for this MVP, to keep server resources in mind, we <text:span text:style-name="T44">should </text:span>have a maximum of <text:span text:style-name="T47">5</text:span> rooms and each room can only contain a maximum of 3 users at any given time. <text:span text:style-name="T48">Let’s also implement it such that the session only lasts until that browser tab is open. If the tab is closed, the ‘user’ is disconnected. Every time the website is </text:span><text:span text:style-name="T71">first </text:span><text:span text:style-name="T48">loaded, we land in the ‘Home’ page and a new ‘user’ with a unique ID is assigned to that tab.</text:span></text:p>
      <text:p text:style-name="P30">The Home ‘page’ <text:span text:style-name="T48">which loads first when </text:span>the user initially lands on the website, will contain 3 items arranged row-wise, first item is the top 10% of space shows the title, <text:span text:style-name="T58">which is ‘</text:span><text:span text:style-name="T57">Live Collab’ as shown in the attached image</text:span> on the left side i.e. at flex-start relative to the parent container(Home div). The next item is one is a list/cards <text:s/>representing the already created available rooms, where available means having at least 1 spot available <text:span text:style-name="T78">for a user to join </text:span>in them<text:span text:style-name="T78">(we only see rooms if they’re successfully created using the create room input box described later below)</text:span>. <text:span text:style-name="T77">Each entry/room in the list also has a subtext below it in the same card that shows number of available spots, for example as: ‘2 spots available’ as shown in image attached below.</text:span></text:p>
      <text:p text:style-name="P30"><text:span text:style-name="T77">The </text:span>other item is an input box with a create button to create a new room with button grayed out initially when no text is entered and only enabled when some text is entered. Also when all <text:span text:style-name="T49">5</text:span> rooms are created the button should be disabled regardless of the content of the input box and a message stating the same should be displayed below the button.</text:p>
      <text:p text:style-name="Standard">Since there are only maximum of 3 users per room, assign their names in the backend as Alpha, Beta and Gamma respectively.</text:p>
      <text:p text:style-name="Standard">All of this is represented by an image I'm <text:span text:style-name="T57">attaching </text:span><text:span text:style-name="T76">below.</text:span></text:p>
      <text:p text:style-name="Standard"/>
      <text:p text:style-name="P29">Image:</text:p>
      <text:p text:style-name="Standard"><draw:frame draw:style-name="fr1" draw:name="Image1" text:anchor-type="char" svg:width="6.9252in" svg:height="3.3701in" draw:z-index="0"><draw:image xlink:href="Pictures/100000000000073900000384DE0BDEE6.png" xlink:type="simple" xlink:show="embed" xlink:actuate="onLoad" draw:mime-type="image/png"/></draw:frame><text:soft-page-break/></text:p>
      <text:p text:style-name="Standard"/>
      <text:p text:style-name="P14">* After the user first lands on the home page, a socket connection is immediately established between server and client and since we will eventually have the users in their respective rooms, we’ll use socket.io library on both front and backends since this library offers rooms support out of the box. Once a connection is established, we immediately send them a list of available rooms on the server through which they can later connect into the room.</text:p>
      <text:p text:style-name="P14"/>
      <text:p text:style-name="P15">* When the user enters text to create a new room in the frontend and submits it, the <text:span text:style-name="T52">frontend</text:span> will <text:span text:style-name="T52">render </text:span><text:span text:style-name="T53">a </text:span>loading screen with a grey overlay so that the screen is not interactable and a special event will be sent to server to check if the room with same name(case insensitive check) and if the maximum limit of rooms(5) is reached or not.</text:p>
      <text:p text:style-name="P15">If either the room is not available due to already existing name or if room limit is reached, <text:span text:style-name="T55">the server sends</text:span> back a specific event to let that user know that room is not available either with the specific <text:span text:style-name="T55">reason as a message </text:span>and once the <text:span text:style-name="T55">client/frontend</text:span> receives that event <text:span text:style-name="T55">along with the message</text:span>, <text:span text:style-name="T55">the </text:span>loading overlay <text:span text:style-name="T55">is removed </text:span>and immediately show a toast notification <text:span text:style-name="T34">with </text:span>this specific message received from the server and the notification is styled using appropriate <text:span text:style-name="T34">tailwind classes </text:span>and is shown on <text:span text:style-name="T34">the top right hand and disappears automatically after a few seconds.</text:span></text:p>
      <text:p text:style-name="P18">If the room is available, then a new room is created with that name using <text:span text:style-name="T52">`</text:span>socket.join(room_name)<text:span text:style-name="T52">`</text:span> and then the user will immediately be moved into that room, <text:span text:style-name="T54">assigned a name based on the rules I described in section above</text:span> and a specific event indicating the success will be sent back to the user and upon receiving this <text:span text:style-name="T54">on the frontend, the loading overlay is remove</text:span><text:span text:style-name="T55">d</text:span><text:span text:style-name="T54"> and the user </text:span><text:span text:style-name="T55">is</text:span> pushed to the ‘Canvas’ page, <text:span text:style-name="T54">and the contents and workings of this page </text:span>is described <text:span text:style-name="T54">in </text:span>the subsequent sections.</text:p>
      <text:p text:style-name="P18"/>
      <text:p text:style-name="P19">* If the user instead of choosing to create a new room, chooses to select an available room from the list stating the same, the<text:span text:style-name="T50"> </text:span>frontend<text:span text:style-name="T50"> will </text:span>render <text:span text:style-name="T53">a </text:span><text:span text:style-name="T50">loading screen with a grey overlay so that the screen is not interactable and a special event will be sent to server. </text:span><text:span text:style-name="T54">On the server, there will be a check made to see if the room does contain a spot for the user requesting to move into.</text:span></text:p>
      <text:p text:style-name="P20">If the room is not available on the server(which happens if the maximum number of users for that room are reached) then a specific event indicating the same will be sent back to the client and <text:span text:style-name="T50">once the </text:span>client/frontend<text:span text:style-name="T50"> receives that event </text:span>along with the message<text:span text:style-name="T50">, </text:span>the <text:span text:style-name="T50">loading overlay </text:span>is removed <text:span text:style-name="T50">and </text:span>be <text:soft-page-break/><text:span text:style-name="T50">immediately show</text:span>n<text:span text:style-name="T50"> a toast notification </text:span><text:span text:style-name="T34">with </text:span><text:span text:style-name="T50">this specific message received from the server and the notification is styled using appropriate </text:span><text:span text:style-name="T34">tailwind classes </text:span><text:span text:style-name="T50">and is shown on </text:span><text:span text:style-name="T34">the top right hand and disappears automatically after a few seconds.</text:span></text:p>
      <text:p text:style-name="P19"><text:span text:style-name="T54">If it does, the user will be moved into the room, assigned a name based on the rules I described in section above</text:span><text:span text:style-name="T51"> and a specific event indicating the success will be sent back to the user and upon receiving this </text:span><text:span text:style-name="T54">on the frontend, the loading overlay is remove</text:span><text:span text:style-name="T55">d</text:span><text:span text:style-name="T54"> and the user </text:span><text:span text:style-name="T55">is</text:span><text:span text:style-name="T51"> pushed to the ‘Canvas’ page, </text:span><text:span text:style-name="T54">and the contents and workings of this page </text:span><text:span text:style-name="T51">is described </text:span><text:span text:style-name="T54">in </text:span><text:span text:style-name="T51">the subsequent sections.</text:span></text:p>
      <text:p text:style-name="Standard"/>
      <text:p text:style-name="Standard">* Once the user enters a room using selection of available rooms or <text:span text:style-name="T52">by </text:span>creat<text:span text:style-name="T52">ing </text:span>a new room, they are now in 'Canvas' page.</text:p>
      <text:p text:style-name="P3">This page is divided into 2 columns.</text:p>
      <text:p text:style-name="P3"><text:span text:style-name="T16">The first column, i.e. column on </text:span>the left is the sidebar, which occupies about <text:span text:style-name="T16">10</text:span>0px of width. In this sidebar, the space is again divided into 3 parts &amp; they are separated by a &lt;hr /&gt;.</text:p>
      <text:p text:style-name="Standard">The top 5% space is reserved to show the title of the project "Live Collab", which is first part.</text:p>
      <text:p text:style-name="Standard">The next 10% of space shows the number of 'Active users' in this room with an appropriate icon and text title stating the same which when hovered upon, shows a popup which shows the names of all the users in this room, and the current user name is represented by a (you) beside the name and in bold, so for example if the current user's name is Beta, the popup would show: Alpha, Beta(you), Gamma. Beta(you) would be in bold and the other 2 would be in default non-bold font weight and this is the second part.</text:p>
      <text:p text:style-name="Standard">In the third part titled 'Mode', we show <text:span text:style-name="T35">3</text:span> buttons <text:span text:style-name="T40">indicating 3 modes</text:span> – ‘drawing mode’, ‘object iteraction mode/<text:span text:style-name="T38">E</text:span>diting mode’ <text:span text:style-name="T35">&amp; ‘Clear board’ </text:span>which are in a single row at the top of this space. By default, when we first enter this 'Canvas' page, we are in 'drawing mode' and the selection of this button is represented appropriately using tailwind classes <text:span text:style-name="T36">and when hovered on the button it shows a tooltip stating ‘drawing mode’. </text:span><text:span text:style-name="T37">Similar tooltips with text stating which mode they’re in applies to other 2 buttons – ‘</text:span><text:span text:style-name="T38">Editing mode’ and ‘Clear board’</text:span>. Below this row of two options, we have another &lt;hr /&gt; separa<text:span text:style-name="T1">t</text:span>ing list of items/options for that row.</text:p>
      <text:p text:style-name="P4">The second column contains a canvas with white background<text:span text:style-name="T17">(let’s call it ‘OG canvas’)</text:span> that is of width=1000 &amp; height=600 and is centered both vertically and horizontally wrt to the second column container space. If the canvas exceeds the bounds of the viewport it is accessible by scrollbars.</text:p>
      <text:p text:style-name="Standard"/>
      <text:p text:style-name="P1">* When 'drawing mode' is selected we have two options - one is a button with freehand tool icon and the other is a button indicating a text block with an appropriate icon.<text:line-break/><text:span text:style-name="T5">Options to change the thickness of the freehand tool/brush </text:span><text:span text:style-name="T62">(&lt;input type="range" class="js-line-range" min="1" max="30" value="1"&gt;)</text:span><text:span text:style-name="T5"> </text:span><text:span text:style-name="T62">with an input of type ‘range’ and with it’s min value of 1, max value of 30 and initial value to be 1 </text:span><text:span text:style-name="T5">and the color (we currently wanna limit </text:span><text:span text:style-name="T61">selection of </text:span><text:span text:style-name="T5">colors to red, green and blue) are </text:span><text:span text:style-name="T9">shown </text:span><text:span text:style-name="T5">below the button with freehand tool icon/brush when we enter into this mode.</text:span></text:p>
      <text:p text:style-name="P21"><text:span text:style-name="T5">When </text:span>using the freehand tool/<text:span text:style-name="T5">brush</text:span> in 'drawing mode', everytime the 'mousedown' event listener <text:span text:style-name="T3">on the canvas</text:span> <text:span text:style-name="T3">is triggered we initialize a Path2D object and a shadow array &amp; start drawing and subsequently on ‘mousemove’ event we save the drawing progress of both a Path2D object and </text:span><text:span text:style-name="T59">the</text:span><text:span text:style-name="T3"> </text:span><text:span text:style-name="T2">shadow array</text:span>. <text:s/><text:span text:style-name="T3">The Path2D object is immediately drawn onto the canvas in the ‘mouseup’ and ‘mouseout’ even</text:span><text:span text:style-name="T5">t</text:span><text:span text:style-name="T3"> callbacks of the canvas. </text:span><text:span text:style-name="T5">And also t</text:span><text:span text:style-name="T4">he shadow array with </text:span><text:span text:style-name="T7">type: ‘text’ and </text:span><text:span text:style-name="T9">isDrawing property set to false with </text:span><text:span text:style-name="T4">a unique ‘event_name’ is</text:span> sent to the server <text:span text:style-name="T9">so that it can </text:span><text:span text:style-name="T60">be saved to the Map/data for that room and </text:span><text:span text:style-name="T9">then</text:span> subsequently <text:span text:style-name="T9">be </text:span>broadcast <text:span text:style-name="T2">to all</text:span> clients<text:span text:style-name="T4">(</text:span><text:span text:style-name="T5">use “</text:span><text:span text:style-name="T4">socket.server.to('room-name').emit('event_name', data)” </text:span><text:span text:style-name="T5">or some other equivalent code to achieve this</text:span><text:span text:style-name="T4">)</text:span><text:span text:style-name="T60"> </text:span>in th<text:span text:style-name="T5">at</text:span> room so that <text:span text:style-name="T5">all clients </text:span>can draw <text:span text:style-name="T5">the </text:span><text:span text:style-name="T9">shadow array/</text:span><text:span text:style-name="T5">object </text:span>programmatically onto their canvas. <text:span text:style-name="T2">The reason for </text:span><text:span text:style-name="T3">sending the object to </text:span><text:span text:style-name="T4">the </text:span><text:span text:style-name="T2">server </text:span><text:span text:style-name="T3">is because</text:span><text:span text:style-name="T2"> every object needs to saved with a UUID</text:span><text:span text:style-name="T3">(</text:span><text:span text:style-name="T5">and this</text:span><text:span text:style-name="T3"> this is </text:span><text:span text:style-name="T2">created on the server), </text:span><text:span text:style-name="T5">and add it to the original Map data structure/data for that room</text:span><text:span text:style-name="T2"> before sending it back to all users </text:span><text:span text:style-name="T4">in that room(</text:span><text:span text:style-name="T5">use “</text:span><text:span text:style-name="T4">socket.server.to('room-name').emit('event_name', data)” </text:span><text:span text:style-name="T5">or some other equivalent code to </text:span><text:soft-page-break/><text:span text:style-name="T5">achieve this</text:span><text:span text:style-name="T4">) </text:span><text:span text:style-name="T2">so that </text:span><text:span text:style-name="T5">the clients in that room can</text:span><text:span text:style-name="T2"> have this object with UUID stored in their local list of objects. UUID for every object is </text:span><text:span text:style-name="T3">particularly useful</text:span><text:span text:style-name="T2"> in ‘Edit mode’ to identify a particular path or text block.</text:span></text:p>
      <text:p text:style-name="P22">The state of selection of the freehand tool brush size and color is saved globally, likely use a global <text:span text:style-name="T63">state like react </text:span>context <text:span text:style-name="T64">defined at the ‘Canvas’ page </text:span><text:span text:style-name="T65">component </text:span><text:span text:style-name="T64">leve</text:span><text:span text:style-name="T65">l</text:span>, so that even if the user navigates to ‘text block’ or ‘edit mode’ and eventually when they come back to freehand tool mode, the last saved brush size and color should be selected.</text:p>
      <text:p text:style-name="Standard"/>
      <text:p text:style-name="P2">* <text:span text:style-name="T6">When user clicks on the ‘</text:span>text <text:span text:style-name="T6">block ‘button</text:span>, <text:span text:style-name="T6">the user can now drag onto the canvas a rectangular text box of any dimension and a cursor inside the box is shown so that the user can type into it. Until the user starts typing, the changes are local and not sent to the server. Once the user starts typing </text:span><text:span text:style-name="T7">the new object with type: ‘text’ </text:span><text:span text:style-name="T8">with </text:span><text:span text:style-name="T11">is</text:span><text:span text:style-name="T12">Drawing</text:span><text:span text:style-name="T7"> property set to true is sent to the server so that the new object gets assigned a new UUID</text:span><text:span text:style-name="T3">(</text:span><text:span text:style-name="T5">and this</text:span><text:span text:style-name="T3"> this is </text:span><text:span text:style-name="T2">created on the server), </text:span><text:span text:style-name="T7">and </text:span><text:span text:style-name="T5">add it to the original Map data structure/data for that room</text:span><text:span text:style-name="T2"> before sending it back to all users </text:span><text:span text:style-name="T4">in that room(</text:span><text:span text:style-name="T5">use “</text:span><text:span text:style-name="T4">socket.server.to('room-name').emit('event_name', data)” </text:span><text:span text:style-name="T5">or some other equivalent code to achieve this</text:span><text:span text:style-name="T4">) </text:span><text:span text:style-name="T8">and subsequent </text:span><text:span text:style-name="T7">delta(</text:span><text:span text:style-name="T8">i.e. </text:span><text:span text:style-name="T7">text updates/</text:span><text:span text:style-name="T8">edits</text:span><text:span text:style-name="T7">) are sent incrementally i.e. once every second to the server with. </text:span><text:span text:style-name="T8">They can still move the box around and that change is also propagated to the server and then broadcast to all clients. </text:span><text:span text:style-name="T7">Only when the user clicks outside the text box, will the isDrawing property </text:span><text:span text:style-name="T8">be </text:span><text:span text:style-name="T7">set to false </text:span><text:span text:style-name="T8">and this change propagated to the server and then broadcast to all clients in that room and now the change is finalized and the text in the box cannot be edited anymore or </text:span><text:span text:style-name="T10">the box itself cannot be </text:span><text:span text:style-name="T8">moved around </text:span><text:span text:style-name="T13">anymore</text:span><text:span text:style-name="T8">.</text:span></text:p>
      <text:p text:style-name="Standard"/>
      <text:p text:style-name="P9">* The other mode is '<text:span text:style-name="T38">O</text:span>bject interaction mode/<text:span text:style-name="T38">E</text:span>diting mode'. Once user enters this mode <text:span text:style-name="T14">by clicking on the button for the same, </text:span><text:span text:style-name="T25">the options for ‘drawing mode’ i.e. button with freehand tool icon and the other is a button indicating a text block with an appropriate icon </text:span><text:span text:style-name="T26">are</text:span><text:span text:style-name="T25"> replaced by a new view which contains:<text:line-break/>a button indicating delete, initially in disabled state. Below that we see a list, </text:span><text:span text:style-name="T30">let’s call it ‘editable list’</text:span><text:span text:style-name="T25"> which represents the names of paths and text blocks(i.e. objects for the shared room the user is in) </text:span><text:span text:style-name="T26">and the title of each of the entry in the list is the name of path or the text block object</text:span><text:span text:style-name="T25">. </text:span><text:span text:style-name="T26">The names are dynamically calculated locally from the shared room object list like so: If there are 3 paths and 2 text blocks, then the names computed should be like Path 1, Path 2, Block 1, Path2, Block 2</text:span><text:span text:style-name="T25">.<text:line-break/>Each card or item in this list is hoverable, clickable and can also be enabled/disabled. Both hoverable and clickable states are visually distinguished appropriately on the button using tailwind classes.</text:span></text:p>
      <text:p text:style-name="P11"><text:span text:style-name="T29">The entry is enabled i</text:span><text:span text:style-name="T31">f </text:span><text:span text:style-name="T29">the isLock property on that object is false and disabled when isLock is true.</text:span><text:span text:style-name="T25"><text:line-break/></text:span><text:span text:style-name="T26">When the user hovers over an entry in the list, </text:span><text:span text:style-name="T27">a temporary transparent</text:span><text:span text:style-name="T26"> </text:span><text:span text:style-name="T27">canvas, let’s call i</text:span><text:span text:style-name="T32">t</text:span><text:span text:style-name="T27"> ‘temp’ canvas is created on top of the ‘OG’ canvas and </text:span><text:span text:style-name="T26">th</text:span><text:span text:style-name="T27">e </text:span><text:span text:style-name="T26">entry’</text:span><text:span text:style-name="T27">s path or text block is drawn on this ‘temp’ canvas and is also </text:span><text:span text:style-name="T26">highlighted </text:span><text:span text:style-name="T27">by a neon blue border glowing around the dimensions of the path or the text block on </text:span><text:span text:style-name="T31">this ‘temp’ canvas </text:span><text:span text:style-name="T27">canvas to indicate the particular object’s location on the ‘temp’ canvas </text:span><text:span text:style-name="T31">to</text:span><text:span text:style-name="T27"> visually aid the user. </text:span><text:span text:style-name="T28">When the user hovers out of the entry, the ‘temp’ canvas is deleted.<text:line-break/>When the user, </text:span><text:span text:style-name="T29">let’s call them user A </text:span><text:span text:style-name="T28">clicks on the entry, </text:span><text:span text:style-name="T29">a loading screen appears and a request to lock this </text:span><text:span text:style-name="T32">entry’s </text:span><text:span text:style-name="T29">object, </text:span><text:span text:style-name="T32">let’s call the object ‘OG object’</text:span><text:span text:style-name="T29"> is sent to the server which then responds to the user A, if the lock is secured or not. If lock is available for that object on the server </text:span><text:span text:style-name="T30">then</text:span><text:span text:style-name="T29"> this new object with isLock: true </text:span><text:span text:style-name="T30">is saved to the data/Map of the the room and is </text:span><text:span text:style-name="T29">is broadcasted to the other users </text:span><text:span text:style-name="T30">and special event is sent back to user A to let them know that the operation was a success, so that they can remove the loading screen.</text:span></text:p>
      <text:p text:style-name="P10">Now a similar transparent ‘temp’ canvas akin to when in hover state is created and <text:span text:style-name="T26">th</text:span><text:span text:style-name="T27">e </text:span><text:span text:style-name="T26">entry’</text:span><text:span text:style-name="T27">s path or text block is drawn on this ‘temp’ canvas and is also </text:span><text:span text:style-name="T26">highlighted </text:span><text:span text:style-name="T27">by a neon blue border glowing around the dimensions of the path or the text block on </text:span>this ‘temp’ canvas <text:span text:style-name="T27">canvas to indicate the particular object’s location on the ‘temp’ canvas </text:span>to<text:span text:style-name="T27"> visually aid the user. </text:span>The object is then saved temporarily locally and the ‘OG’ canvas is re-rendered without this object. When the user’s cursor is on or inside <text:soft-page-break/>the boundaries or in the ’hit-zone’ of this glowing object, they are able to click and drag it to another position on the ‘temp’ canvas. After releasing the click of the mouse, is when the new position co-ordinates are sent to the server as a specific event so that the position of the object on the Map/data is updated and broadcasted to other users, who upon receiving this event from the server re-render their <text:s/>‘OG’ canvas without this object and then draw the same object’s new position that was received from this event onto the ‘OG’ canvas. <text:span text:style-name="T32">Now in user A land, only when the </text:span><text:span text:style-name="T33">user A</text:span><text:span text:style-name="T32"> click</text:span><text:span text:style-name="T33">s</text:span><text:span text:style-name="T32"> on another enabled entry or go</text:span><text:span text:style-name="T33">es</text:span><text:span text:style-name="T32"> back to ‘drawing mode’ does the isLock of the ‘OG object’ is set to false locally and then sent as a specific event to the server, so that the server can set the isLock:false on this object in the shared room’s Map/data and then a specific event is broadcasted to other users, which when seen by other users, would then update the ‘OG’ object on their main data list with isLock: false.</text:span></text:p>
      <text:p text:style-name="P13">If the lock is not available, which means the object with isLock is already set to true on the server prior to the arrival of the original request, and in this case a error specific event is sent back to user A, so that then can remove the loading screen and update the local object with isLock: true which should automatically make the entry to be in disabled state in the ‘editable list’.<text:line-break/></text:p>
      <text:p text:style-name="Standard"/>
      <text:p text:style-name="P8">a loading screen with a light gray border immediately overlays this user's page which disallows the user from performing any other action and a request to server is sent to check whether a lock is available or not. If the server allows to go into edit mode, the loading screen goes away and the user is now in '<text:span text:style-name="T38">E</text:span>diting mode'. If the server doesn't allow, the loading screen goes away, the user is pushed back to editing mode and a notification that someone else(server sends only the name of the user who has the lock acquired) is in ‘<text:span text:style-name="T39">E</text:span>diting mode’ is shown.</text:p>
      <text:p text:style-name="Standard"/>
      <text:p text:style-name="P12">* The third mode is ‘<text:span text:style-name="T41">Clear board’ which when clicked should clear the ‘OG canvas’ locally </text:span><text:span text:style-name="T45">and push the user to ‘drawing mode’ </text:span><text:span text:style-name="T41">and also specific event to do the same is sent to the server where the shared Map/data for that room is </text:span><text:span text:style-name="T42">reset</text:span><text:span text:style-name="T41"> and this </text:span><text:span text:style-name="T42">data </text:span><text:span text:style-name="T41">is broadcast</text:span><text:span text:style-name="T42">ed</text:span><text:span text:style-name="T41"> as a specific event to the other users who update their </text:span><text:span text:style-name="T42">local </text:span><text:span text:style-name="T41">data </text:span><text:span text:style-name="T45">to reflect the same and are pushed to ‘drawing mode’ as well</text:span><text:span text:style-name="T41">. </text:span><text:span text:style-name="T42">Whichever state any of the rest of the users are in, the </text:span><text:span text:style-name="T46">canvas </text:span><text:span text:style-name="T42">should be cleared and given priority over their actions during the time they receive this event and their actions/state they’re in should be reset </text:span><text:span text:style-name="T43">as if they’re seeing an empty ‘OG’ canvas with empty local data</text:span><text:span text:style-name="T42">.</text:span></text:p>
      <text:p text:style-name="Standard"/>
      <text:p text:style-name="P5">* Any time a new user joins the room, their name is broadcast to all other users, so that it can be stored by other users locally and then automatically be shown in the 'Active users' section <text:span text:style-name="T18">in the first column of </text:span>the ‘Canvas’ page. A transparent canvas <text:span text:style-name="T18">with id=‘</text:span><text:span text:style-name="T19">User_X_name</text:span><text:span text:style-name="T18">’ </text:span>is immediately created <text:span text:style-name="T18">on top of the </text:span><text:span text:style-name="T17">‘OG canvas’ </text:span><text:span text:style-name="T18">with the same width and height of the </text:span><text:span text:style-name="T17">‘OG canvas’. </text:span><text:span text:style-name="T34">Also a toast notification with appropriate tailwind classes on the top right hand side is shown for other users stating that ‘User_X_name has entered the room’ is shown and disappears automatically after a few seconds.</text:span></text:p>
      <text:p text:style-name="P7">Whenever a user disconnects, the server broadcasts a specific event related to this along with the name of the user in data to the rest of the users, so that the users when they receive this specific event, can delete the <text:span text:style-name="T22">specific</text:span> <text:span text:style-name="T16">transparent canvas </text:span><text:span text:style-name="T18">with id=‘</text:span><text:span text:style-name="T19">User_X_name</text:span><text:span text:style-name="T18">’ <text:s/></text:span>where x = name of the user they received in data <text:span text:style-name="T21">who got disconnected </text:span><text:span text:style-name="T23">and their name is also removed the from the </text:span><text:span text:style-name="T24">popup of the </text:span><text:span text:style-name="T23">‘Active users’</text:span>. <text:s/><text:span text:style-name="T34">Also a toast notification with appropriate tailwind classes on the top right hand side is shown for other users stating that ‘User_X_name has left the room’ is shown and disappears automatically after a few seconds.</text:span></text:p>
      <text:p text:style-name="P4"/>
      <text:p text:style-name="P6"><text:span text:style-name="T15">* </text:span><text:span text:style-name="T56">F</text:span><text:span text:style-name="T15">or real-time cursor position of other connected users, we implement a separate useEffect inside which is an exclusive ‘mousemove’ event listener that records every move position </text:span><text:span text:style-name="T17">of the mouse move</text:span><text:span text:style-name="T15"> co-ordinate into a useRef. In the same useEffect, but outside the event listener, we have a setInterval </text:span><text:span text:style-name="T19">that runs every 1 second </text:span><text:span text:style-name="T15">that emits </text:span><text:span text:style-name="T16">a separate specific event that </text:span><text:span text:style-name="T19">sends</text:span><text:span text:style-name="T16"> </text:span><text:span text:style-name="T15">the co-ordinates position from </text:span><text:soft-page-break/><text:span text:style-name="T15">this useRef </text:span><text:span text:style-name="T19">for this user, let’s call them user A to </text:span><text:span text:style-name="T16">the server so that it can be broadcast to all other users</text:span><text:span text:style-name="T15">. </text:span><text:span text:style-name="T16">When other user, </text:span><text:span text:style-name="T19">let’s call them user B,</text:span><text:span text:style-name="T16"> receives position of user </text:span><text:span text:style-name="T19">A, user B</text:span><text:span text:style-name="T16"> update</text:span><text:span text:style-name="T19">s </text:span><text:span text:style-name="T18">the</text:span><text:span text:style-name="T20">ir</text:span><text:span text:style-name="T18"> transparent canvas at th</text:span><text:span text:style-name="T20">is </text:span><text:span text:style-name="T18">position </text:span><text:span text:style-name="T19">for </text:span><text:span text:style-name="T18">the initial user </text:span><text:span text:style-name="T20">A which has </text:span><text:span text:style-name="T18">id=’</text:span><text:span text:style-name="T19">User_A_name</text:span><text:span text:style-name="T18">’ to show a dot</text:span><text:span text:style-name="T20">(like a bullet point and</text:span><text:span text:style-name="T18"> with the name of the </text:span><text:span text:style-name="T20">User A </text:span><text:span text:style-name="T18">beside i</text:span><text:span text:style-name="T20">t</text:span><text:span text:style-name="T18">. Since there are at most 3 users in a room at any given time, and one user can only ever receive the position of at most 2 other users, the </text:span><text:span text:style-name="T20">dot and the user’s name’s text</text:span><text:span text:style-name="T18"> can be indicated with </text:span><text:span text:style-name="T20">color </text:span><text:span text:style-name="T18">‘orange’ for the first user and ‘pink’ for the seco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19:27:23.852080790</meta:creation-date>
    <dc:date>2026-05-03T19:04:51.319694976</dc:date>
    <meta:editing-duration>PT22H10M54S</meta:editing-duration>
    <meta:editing-cycles>96</meta:editing-cycles>
    <meta:generator>LibreOffice/24.2.7.2$Linux_X86_64 LibreOffice_project/420$Build-2</meta:generator>
    <meta:document-statistic meta:table-count="0" meta:image-count="1" meta:object-count="0" meta:page-count="8" meta:paragraph-count="94" meta:word-count="3927" meta:character-count="22279" meta:non-whitespace-character-count="18422"/>
  </office:meta>
</office:document-meta>
</file>